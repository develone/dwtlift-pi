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1000001D282CB46F4F4EA9BD4.png" manifest:media-type="image/png"/>
  <manifest:file-entry manifest:full-path="Pictures/10000000000003A2000001D81042BF8511532461.png" manifest:media-type="image/png"/>
  <manifest:file-entry manifest:full-path="Pictures/10000000000003A4000001D74DAC1FC561CD6865.png" manifest:media-type="image/png"/>
  <manifest:file-entry manifest:full-path="Pictures/10000000000002650000018EA8F3FE387BBFED9F.png" manifest:media-type="image/png"/>
  <manifest:file-entry manifest:full-path="Pictures/1000000000000233000001883379A3B09712C02E.png" manifest:media-type="image/png"/>
  <manifest:file-entry manifest:full-path="Pictures/10000000000002C9000001B9965B10C4C360555C.png" manifest:media-type="image/png"/>
  <manifest:file-entry manifest:full-path="Pictures/10000000000001D40000010AD880F3F56C702D6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aa327" officeooo:paragraph-rsid="001aa327"/>
    </style:style>
    <style:style style:name="P2" style:family="paragraph" style:parent-style-name="Standard">
      <style:text-properties officeooo:rsid="001bf749" officeooo:paragraph-rsid="001bf749"/>
    </style:style>
    <style:style style:name="P3" style:family="paragraph" style:parent-style-name="Standard">
      <style:text-properties officeooo:rsid="00228dc1" officeooo:paragraph-rsid="00228dc1"/>
    </style:style>
    <style:style style:name="P4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2434b0" officeooo:paragraph-rsid="002434b0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2434b0" officeooo:paragraph-rsid="002434b0"/>
    </style:style>
    <style:style style:name="P6" style:family="paragraph" style:parent-style-name="Standard">
      <style:text-properties officeooo:rsid="00270e67" officeooo:paragraph-rsid="00270e67"/>
    </style:style>
    <style:style style:name="P7" style:family="paragraph" style:parent-style-name="Standard">
      <style:text-properties officeooo:rsid="0028bed4" officeooo:paragraph-rsid="0028bed4"/>
    </style:style>
    <style:style style:name="P8" style:family="paragraph" style:parent-style-name="Standard">
      <style:text-properties officeooo:rsid="0028f895" officeooo:paragraph-rsid="0028f895"/>
    </style:style>
    <style:style style:name="P9" style:family="paragraph" style:parent-style-name="Standard">
      <style:text-properties officeooo:rsid="001bf749" officeooo:paragraph-rsid="001bf749"/>
    </style:style>
    <style:style style:name="P10" style:family="paragraph" style:parent-style-name="Standard">
      <style:text-properties officeooo:rsid="002d6eeb" officeooo:paragraph-rsid="002d6eeb"/>
    </style:style>
    <style:style style:name="T1" style:family="text">
      <style:text-properties officeooo:rsid="001aa327"/>
    </style:style>
    <style:style style:name="T2" style:family="text">
      <style:text-properties officeooo:rsid="00270e6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********************Defa<text:span text:style-name="T2">u</text:span>lt********************</text:p>
      <text:p text:style-name="P5">Different test.j2k files using myTTDecoder</text:p>
      <text:p text:style-name="P5">05/26/26</text:p>
      <text:p text:style-name="P4">********************Defa<text:span text:style-name="T2">u</text:span>lt********************</text:p>
      <text:p text:style-name="P3"/>
      <text:p text:style-name="P3"/>
      <text:p text:style-name="P7">myTTDecoder is currently running on a Raspberry Pi4 or Raspberry Pi-zero.</text:p>
      <text:p text:style-name="P7"/>
      <text:p text:style-name="P7">Raspberry Pi 4 4Gb</text:p>
      <text:p text:style-name="P7"/>
      <text:p text:style-name="P7"><draw:frame draw:style-name="fr3" draw:name="Image4" text:anchor-type="char" svg:width="3.6457in" svg:height="2.2319in" draw:z-index="3"><draw:image xlink:href="Pictures/10000000000001D40000010AD880F3F56C702D6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aspberry Pi-Zero</text:p>
      <text:p text:style-name="P7"/>
      <text:p text:style-name="P7"/>
      <text:p text:style-name="P7"><draw:frame draw:style-name="fr3" draw:name="Image5" text:anchor-type="char" svg:width="3.7638in" svg:height="2.2717in" draw:z-index="4"><draw:image xlink:href="Pictures/10000000000002C9000001B9965B10C4C360555C.png" xlink:type="simple" xlink:show="embed" xlink:actuate="onLoad" draw:mime-type="image/png"/></draw:frame></text:p>
      <text:p text:style-name="P7"/>
      <text:p text:style-name="P7"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The goal is to get this code running on a Raspberry Pico or Raspberry Pico2.</text:p>
      <text:p text:style-name="P8">Pico a$4.00 device</text:p>
      <text:p text:style-name="P8"/>
      <text:p text:style-name="P7"><draw:frame draw:style-name="fr2" draw:name="Image6" text:anchor-type="char" svg:width="4.3161in" svg:height="2.8035in" draw:z-index="5"><draw:image xlink:href="Pictures/10000000000002650000018EA8F3FE387BBFED9F.png" xlink:type="simple" xlink:show="embed" xlink:actuate="onLoad" draw:mime-type="image/png"/></draw:frame></text:p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8">Pico2 a $6.00 device</text:p>
      <text:p text:style-name="P3"/>
      <text:p text:style-name="P3"/>
      <text:p text:style-name="P3"><draw:frame draw:style-name="fr2" draw:name="Image7" text:anchor-type="char" svg:width="3.7744in" svg:height="2.8909in" draw:z-index="6"><draw:image xlink:href="Pictures/1000000000000233000001883379A3B09712C02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he smaller the test.j2k file the more compression was done.</text:p>
      <text:p text:style-name="P3"/>
      <text:p text:style-name="P6">Three test.j2k files were tested <text:span text:style-name="T1">test_256_125.j2k, test_256_100.j2k, </text:span>and <text:span text:style-name="T1">test_256_25.j2k.</text:span></text:p>
      <text:p text:style-name="P1"/>
      <text:p text:style-name="P1">devel@pi5-70:~/dwtlift-pi/pi-xx $ ls -la test*.j2k</text:p>
      <text:p text:style-name="P1">-rw-r--r-- 1 devel devel 1980 May 26 12:00 test_256_100.j2k</text:p>
      <text:p text:style-name="P1">-rw-r--r-- 1 devel devel 1557 May 26 12:00 test_256_125.j2k</text:p>
      <text:p text:style-name="P1">-rw-r--r-- 1 devel devel 7877 May 26 12:00 test_256_25.j2k</text:p>
      <text:p text:style-name="P1">-rw-r--r-- 1 devel devel 3945 May 26 12:00 test_256_50.j2k</text:p>
      <text:p text:style-name="P1">-rw-r--r-- 1 devel devel 2554 May 26 12:00 test_256_75.j2k</text:p>
      <text:p text:style-name="P1">-rw-r--r-- 1 devel devel 7877 May 26 12:35 test.j2k</text:p>
      <text:p text:style-name="P1"/>
      <text:p text:style-name="P1">devel@pi5-70:~/dwtlift-pi/pi-xx $ diff test_256_125.j2k test.j2k</text:p>
      <text:p text:style-name="P1"/>
      <text:p text:style-name="P1"><draw:frame draw:style-name="fr1" draw:name="Image1" text:anchor-type="char" svg:width="6.6929in" svg:height="3.3965in" draw:z-index="0"><draw:image xlink:href="Pictures/10000000000003A2000001D81042BF8511532461.png" xlink:type="simple" xlink:show="embed" xlink:actuate="onLoad" draw:mime-type="image/png"/></draw:frame></text:p>
      <text:p text:style-name="P1"><text:soft-page-break/>devel@pi5-70:~/dwtlift-pi/pi-xx $ ./myTTDecoder </text:p>
      <text:p text:style-name="P1">da_x0 = 0 da_y0 = 0 da_x1 = 256 da_y1 = 256</text:p>
      <text:p text:style-name="P1">*ff = 0x74 ff_in= test.j2k</text:p>
      <text:p text:style-name="P1">calling decom_test</text:p>
      <text:p text:style-name="P1">In decom_test called by C myTTDecoder.c test.j2k 0 0 256 256 test.j2k</text:p>
      <text:p text:style-name="P1">0 0 256 256 test.j2k l_data_size 196608 0x3306c010 </text:p>
      <text:p text:style-name="P1">Start decompression: -1780666187 seconds -1779817991 useconds -848196 starting openjpeg</text:p>
      <text:p text:style-name="P1">l_stream 0xcf2a4890</text:p>
      <text:p text:style-name="P1">In infile_format test.j2k reader 0xcf2a5920</text:p>
      <text:p text:style-name="P1">test.j2k l_nb_read 12 0xcf2a5920 0xff 0x4f 0xff 0x51 0x0 0x2f 0x0 0x0 0x0 0x0 0x1 0x0 </text:p>
      <text:p text:style-name="P1">[INFO] Start to read j2k main header (0).</text:p>
      <text:p text:style-name="P1">[INFO] Main header has been correctly decoded.</text:p>
      <text:p text:style-name="P1">[INFO] Setting decoding area to 0,0,256,256</text:p>
      <text:p text:style-name="P1">[INFO] Header of tile 1 / 1 has been read.</text:p>
      <text:p text:style-name="P1">Decompression time: 14545 seconds 0 useconds 14545 </text:p>
      <text:p text:style-name="P1">start writing: -28 seconds 0 useconds -28 starting openjpeg</text:p>
      <text:p text:style-name="P1">file name red data ptr 0x3306c010 size 65536 </text:p>
      <text:p text:style-name="P1">file name green data ptr 0x3308c010 size 65536 </text:p>
      <text:p text:style-name="P1">file name blue data ptr 0x3307c010 size 65536 </text:p>
      <text:p text:style-name="P1">WR imagesize = 0x30000 </text:p>
      <text:p text:style-name="P1">Wr bpp = 24 </text:p>
      <text:p text:style-name="P1">Wr xresolution = 2835 yresolution 2835 </text:p>
      <text:p text:style-name="P1">File writes: 2783 seconds 0 useconds 2783 starting openjpeg</text:p>
      <text:p text:style-name="P1"/>
      <text:p text:style-name="P1"/>
      <text:p text:style-name="P1"><text:s/></text:p>
      <text:p text:style-name="P1">devel@pi5-70:~/dwtlift-pi/pi-xx $ diff test_256_100.j2k test.j2k</text:p>
      <text:p text:style-name="P2"><text:s/><draw:frame draw:style-name="fr1" draw:name="Image2" text:anchor-type="char" svg:width="6.6929in" svg:height="3.3819in" draw:z-index="1"><draw:image xlink:href="Pictures/10000000000003A4000001D74DAC1FC561CD6865.png" xlink:type="simple" xlink:show="embed" xlink:actuate="onLoad" draw:mime-type="image/png"/></draw:frame></text:p>
      <text:p text:style-name="P2"/>
      <text:p text:style-name="P2">devel@pi5-70:~/dwtlift-pi/pi-xx $ diff test_256_25.j2k test.j2k</text:p>
      <text:p text:style-name="P2"/>
      <text:p text:style-name="P2"><draw:frame draw:style-name="fr1" draw:name="Image3" text:anchor-type="char" svg:width="6.6929in" svg:height="3.3571in" draw:z-index="2"><draw:image xlink:href="Pictures/10000000000003A1000001D282CB46F4F4EA9BD4.png" xlink:type="simple" xlink:show="embed" xlink:actuate="onLoad" draw:mime-type="image/png"/></draw:frame><text:soft-page-break/></text:p>
      <text:p text:style-name="P2"/>
      <text:p text:style-name="P10">en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6T12:10:19.493617947</meta:creation-date>
    <dc:date>2026-05-26T18:28:44.878238885</dc:date>
    <meta:editing-duration>PT1H11M43S</meta:editing-duration>
    <meta:editing-cycles>14</meta:editing-cycles>
    <meta:generator>LibreOffice/7.4.7.2$Linux_AARCH64 LibreOffice_project/40$Build-2</meta:generator>
    <meta:document-statistic meta:table-count="0" meta:image-count="7" meta:object-count="0" meta:page-count="4" meta:paragraph-count="49" meta:word-count="315" meta:character-count="2148" meta:non-whitespace-character-count="1872"/>
  </office:meta>
</office:document-meta>
</file>
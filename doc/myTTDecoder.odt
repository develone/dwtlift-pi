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8E000001D15A39735B8E38E021.png" manifest:media-type="image/png"/>
  <manifest:file-entry manifest:full-path="Pictures/1000000000000100000001001C72EC4AD5BB2EA0.bmp" manifest:media-type="image/bmp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a3e27" officeooo:paragraph-rsid="001a3e27"/>
    </style:style>
    <style:style style:name="P2" style:family="paragraph" style:parent-style-name="Standard">
      <style:paragraph-properties fo:text-align="center" style:justify-single-word="false"/>
      <style:text-properties officeooo:rsid="001a3e27" officeooo:paragraph-rsid="001a3e27"/>
    </style:style>
    <style:style style:name="P3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a3e27" officeooo:paragraph-rsid="001a3e27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c0393" officeooo:paragraph-rsid="001c0393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a3e27" officeooo:paragraph-rsid="001a3e2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******Draft************************</text:p>
      <text:p text:style-name="P4">myTTDecoder </text:p>
      <text:p text:style-name="P5">05/25/26</text:p>
      <text:p text:style-name="P3">************************Draft************************</text:p>
      <text:p text:style-name="P2"/>
      <text:p text:style-name="P1">devel@pi4-50:~/dwtlift-pi/src $ ./compile_pi.sh</text:p>
      <text:p text:style-name="P1"/>
      <text:p text:style-name="P1">devel@pi4-50:~/dwtlift-pi/pi-xx $ ./libbuild.sh</text:p>
      <text:p text:style-name="P1"/>
      <text:p text:style-name="P1">7877 May 24 13:21 test.j2k</text:p>
      <text:p text:style-name="P1"/>
      <text:p text:style-name="P1">steps to get a test.j2k from lena_rgb_256.bmp</text:p>
      <text:p text:style-name="P1"/>
      <text:p text:style-name="P1">devel@pi5-70:~ $ git clone https://github.com/develone/openjpeg.git -b ultibo</text:p>
      <text:p text:style-name="P1"/>
      <text:p text:style-name="P1">devel@pi5-70:~ $ cd openjpeg/</text:p>
      <text:p text:style-name="P1"/>
      <text:p text:style-name="P1">devel@pi5-70:~/openjpeg $ cd build</text:p>
      <text:p text:style-name="P1"/>
      <text:p text:style-name="P1">devel@pi5-70:~/openjpeg/build $ cmake ../</text:p>
      <text:p text:style-name="P1"/>
      <text:p text:style-name="P1">devel@pi5-70:~/openjpeg/build $ make</text:p>
      <text:p text:style-name="P1"/>
      <text:p text:style-name="P1">devel@pi5-70:~/openjpeg/build $ cd bin</text:p>
      <text:p text:style-name="P1"/>
      <text:p text:style-name="P1">devel@pi5-70:~/openjpeg/build/bin $ ./opj_compress -r 25 -i ../../lena_rgb_256.bmp -o test.j2k</text:p>
      <text:p text:style-name="P1"/>
      <text:p text:style-name="P1">devel@pi4-50:~/dwtlift-pi/pi-xx $ git remote -v</text:p>
      <text:p text:style-name="P1">origin<text:tab/>https://github.com/develone/dwtlift-pi.git (fetch)</text:p>
      <text:p text:style-name="P1">origin<text:tab/>https://github.com/develone/dwtlift-pi.git (push)</text:p>
      <text:p text:style-name="P1"/>
      <text:p text:style-name="P1">commit 9a44fcff48271b497f24f9a13e79c804f192cf2e (HEAD -&gt; main)</text:p>
      <text:p text:style-name="P1">Author: Edward Vidal Jr &lt;develone@sbcglobal.net&gt;</text:p>
      <text:p text:style-name="P1">Date: <text:s text:c="2"/>Mon May 25 13:32:08 2026 -0600</text:p>
      <text:p text:style-name="P1"/>
      <text:p text:style-name="P1"><text:s text:c="4"/>update needed</text:p>
      <text:p text:style-name="P1">196730 May 25 16:37 test_wr.bm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3.5547in" svg:height="3.5547in" draw:z-index="1"><draw:image xlink:href="Pictures/1000000000000100000001001C72EC4AD5BB2EA0.bmp" xlink:type="simple" xlink:show="embed" xlink:actuate="onLoad" draw:mime-type="image/bmp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vel@pi4-50:~/dwtlift-pi/pi-xx $ gcc -g myTTDecoder.c -L. -ldwtlift -lm -o myTTDecoder</text:p>
      <text:p text:style-name="P1"/>
      <text:p text:style-name="P1"/>
      <text:p text:style-name="P1">devel@pi4-50:~/dwtlift-pi/pi-xx $ ./myTTDecoder </text:p>
      <text:p text:style-name="P1">da_x0 = 0 da_y0 = 0 da_x1 = 256 da_y1 = 256</text:p>
      <text:p text:style-name="P1">*ff = 0x74 ff_in= test.j2k</text:p>
      <text:p text:style-name="P1">calling decom_test</text:p>
      <text:p text:style-name="P1">In decom_test called by C myTTDecoder.c test.j2k 0 0 256 256 test.j2k</text:p>
      <text:p text:style-name="P1">0 0 256 256 test.j2k l_data_size 196608 0xb28bf010 </text:p>
      <text:p text:style-name="P1">Start decompression: -1780533041 seconds -1779748648 useconds -784393 starting openjpeg</text:p>
      <text:p text:style-name="P1">l_stream 0xc4695890</text:p>
      <text:p text:style-name="P1">In infile_format test.j2k reader 0xc4696920</text:p>
      <text:p text:style-name="P1">test.j2k l_nb_read 12 0xc4696920 0xff 0x4f 0xff 0x51 0x0 0x2f 0x0 0x0 0x0 0x0 0x1 0x0 </text:p>
      <text:p text:style-name="P1">[INFO] Start to read j2k main header (0).</text:p>
      <text:p text:style-name="P1">[INFO] Main header has been correctly decoded.</text:p>
      <text:p text:style-name="P1">[INFO] Setting decoding area to 0,0,256,256</text:p>
      <text:p text:style-name="P1">[INFO] Header of tile 1 / 1 has been read.</text:p>
      <text:p text:style-name="P1">Decompression time: 56771 seconds 0 useconds 56771 </text:p>
      <text:p text:style-name="P1">start writing: -118 seconds 0 useconds -118 starting openjpeg</text:p>
      <text:p text:style-name="P1">file name red data ptr 0xb28bf010 size 65536 </text:p>
      <text:p text:style-name="P1">file name green data ptr 0xb28df010 size 65536 </text:p>
      <text:p text:style-name="P1">file name blue data ptr 0xb28cf010 size 65536 </text:p>
      <text:p text:style-name="P1">WR imagesize = 0x30000 </text:p>
      <text:p text:style-name="P1">Wr bpp = 24 </text:p>
      <text:p text:style-name="P1">Wr xresolution = 2835 yresolution 2835 </text:p>
      <text:p text:style-name="P1">File writes: 18857 seconds 0 useconds 18857 starting openjpeg</text:p>
      <text:p text:style-name="P1"/>
      <text:p text:style-name="P1">rgb.m</text:p>
      <text:p text:style-name="P1"/>
      <text:p text:style-name="P1">clear</text:p>
      <text:p text:style-name="P1">fid = fopen('red','r'); im1 = fread(fid, [256,inf], 'int8'); fclose(fid);</text:p>
      <text:p text:style-name="P1">fid = fopen('green','r'); im2 = fread(fid, [256,inf], 'int8'); fclose(fid);</text:p>
      <text:p text:style-name="P1">fid = fopen('blue','r'); im3 = fread(fid, [256,inf], 'int8'); fclose(fid);</text:p>
      <text:p text:style-name="P1"/>
      <text:p text:style-name="P1">figure;</text:p>
      <text:p text:style-name="P1">imagesc(im1);</text:p>
      <text:p text:style-name="P1">colorbar</text:p>
      <text:p text:style-name="P1">colormap 'gray'</text:p>
      <text:p text:style-name="P1">title "myTTDecoder red 05/25/26"</text:p>
      <text:p text:style-name="P1"><text:soft-page-break/></text:p>
      <text:p text:style-name="P1">figure;</text:p>
      <text:p text:style-name="P1">imagesc(im2);</text:p>
      <text:p text:style-name="P1">colorbar;</text:p>
      <text:p text:style-name="P1">colormap 'gray'</text:p>
      <text:p text:style-name="P1">title "myTTDecoder green 05/25/26"</text:p>
      <text:p text:style-name="P1"/>
      <text:p text:style-name="P1">figure;</text:p>
      <text:p text:style-name="P1">imagesc(im3);</text:p>
      <text:p text:style-name="P1">colorbar;</text:p>
      <text:p text:style-name="P1">colormap 'gray'</text:p>
      <text:p text:style-name="P1">title "myTTDecoder blue 05/25/26"</text:p>
      <text:p text:style-name="P1"/>
      <text:p text:style-name="P1"><draw:frame draw:style-name="fr2" draw:name="Image1" text:anchor-type="char" svg:width="6.6929in" svg:height="1.8543in" draw:z-index="0"><draw:image xlink:href="Pictures/100000000000068E000001D15A39735B8E38E021.png" xlink:type="simple" xlink:show="embed" xlink:actuate="onLoad" draw:mime-type="image/png"/></draw:frame></text:p>
      <text:p text:style-name="P1">x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5T16:35:36.514059207</meta:creation-date>
    <dc:date>2026-05-25T17:19:49.700618904</dc:date>
    <meta:editing-duration>PT44M15S</meta:editing-duration>
    <meta:editing-cycles>4</meta:editing-cycles>
    <meta:generator>LibreOffice/7.4.7.2$Linux_AARCH64 LibreOffice_project/40$Build-2</meta:generator>
    <meta:document-statistic meta:table-count="0" meta:image-count="2" meta:object-count="0" meta:page-count="3" meta:paragraph-count="68" meta:word-count="327" meta:character-count="2594" meta:non-whitespace-character-count="2318"/>
  </office:meta>
</office:document-meta>
</file>